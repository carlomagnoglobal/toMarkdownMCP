
<file path=content.xml><?xml version="1.0" encoding="utf-8"?>
<office:document-content xmlns:office="urn:oasis:names:tc:opendocument:xmlns:office:1.0" xmlns:text="urn:oasis:names:tc:opendocument:xmlns:text:1.0">
  <office:body>
    <office:text>
      <text:h text:outline-level="1">Sample ODT</text:h>
      <text:p>This is a paragraph in an OpenDocument Text file.</text:p>
      <text:h text:outline-level="2">Details</text:h>
      <text:list>
        <text:list-item>
          <text:p>First point</text:p>
        </text:list-item>
        <text:list-item>
          <text:p>Second point</text:p>
        </text:list-item>
      </text:list>
    </office:text>
  </office:body>
</office:document-content>
</file>